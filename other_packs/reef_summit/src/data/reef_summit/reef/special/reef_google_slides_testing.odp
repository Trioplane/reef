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54;p13" draw:style-name="gr1" draw:text-style-name="P2" draw:layer="layout" svg:width="5.755cm" svg:height="1.271cm" svg:x="2.573cm" svg:y="1.896cm">
          <text:p text:style-name="P1"><text:span text:style-name="T1">text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6.855cm" svg:height="1.271cm" svg:x="8.007cm" svg:y="7.398cm">
          <text:p text:style-name="P1"><text:span text:style-name="T1">text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2" draw:layer="layout" svg:width="4.434cm" svg:height="1.271cm" svg:x="16.014cm" svg:y="4.808cm">
          <text:p text:style-name="P1"><text:span text:style-name="T1">text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3f7b7ca1f24_0_10:notes" draw:style-name="gr2" draw:layer="layout" svg:width="16.932cm" svg:height="9.524cm" svg:x="1.059cm" svg:y="1.905cm" draw:page-number="1" presentation:class="page"/>
          <draw:frame draw:name="Google Shape;52;g3f7b7ca1f24_0_10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"/>
    <meta:generator>LibreOfficeDev/6.0.5.2$Linux_X86_64 LibreOffice_project/</meta:generator>
  </office:meta>
</office:document-meta>
</file>