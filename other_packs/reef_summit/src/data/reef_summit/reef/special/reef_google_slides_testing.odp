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utfit" svg:font-family="Outfi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utfit" fo:font-size="26pt" fo:letter-spacing="normal" fo:font-style="normal" style:text-underline-style="none" fo:font-weight="normal" style:font-name-asian="Outfit" style:font-size-asian="26pt" style:font-style-asian="normal" style:font-weight-asian="normal" style:font-name-complex="Outfit" style:font-size-complex="26pt" style:font-style-complex="normal" style:font-weight-complex="normal"/>
    </style:style>
    <style:style style:name="T3" style:family="text">
      <style:text-properties fo:font-variant="normal" fo:text-transform="none" fo:color="#4285f4" style:text-line-through-style="none" style:text-line-through-type="none" style:text-position="0% 100%" style:font-name="Outfit" fo:font-size="23pt" fo:letter-spacing="normal" fo:font-style="normal" style:text-underline-style="none" fo:font-weight="normal" style:font-name-asian="Outfit" style:font-size-asian="23pt" style:font-style-asian="normal" style:font-weight-asian="normal" style:font-name-complex="Outfit" style:font-size-complex="2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utfit" fo:font-size="72pt" fo:letter-spacing="normal" fo:font-style="normal" style:text-underline-style="none" fo:font-weight="normal" style:font-name-asian="Outfit" style:font-size-asian="72pt" style:font-style-asian="normal" style:font-weight-asian="normal" style:font-name-complex="Outfit" style:font-size-complex="7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utfit" fo:font-size="96pt" fo:letter-spacing="normal" fo:font-style="normal" style:text-underline-style="none" fo:font-weight="normal" style:font-name-asian="Outfit" style:font-size-asian="96pt" style:font-style-asian="normal" style:font-weight-asian="normal" style:font-name-complex="Outfit" style:font-size-complex="9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54;p13" draw:style-name="gr1" draw:text-style-name="P2" draw:layer="layout" svg:width="5.755cm" svg:height="1.271cm" svg:x="2.573cm" svg:y="1.896cm">
          <text:p text:style-name="P1"><text:span text:style-name="T1">text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6.855cm" svg:height="1.271cm" svg:x="8.007cm" svg:y="7.398cm">
          <text:p text:style-name="P1"><text:span text:style-name="T1">text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2" draw:layer="layout" svg:width="4.434cm" svg:height="1.271cm" svg:x="16.014cm" svg:y="4.808cm">
          <text:p text:style-name="P1"><text:span text:style-name="T1">text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2" draw:layer="layout" svg:width="5.755cm" svg:height="1.609cm" svg:x="7.213cm" svg:y="3.401cm">
          <text:p text:style-name="P1"><text:span text:style-name="T2">Big black 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1" draw:text-style-name="P2" draw:layer="layout" svg:width="5.755cm" svg:height="1.482cm" svg:x="16.014cm" svg:y="10.15cm">
          <text:p text:style-name="P1"><text:span text:style-name="T3">Blue 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2" draw:layer="layout" svg:width="28.841cm" svg:height="1.609cm" svg:x="5.164cm" svg:y="8.68cm">
          <text:p text:style-name="P1"><text:span text:style-name="T2">AAAAAAAAAAAAAAAAAAAAAAAAAAAAAAAAAAA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1" draw:text-style-name="P2" draw:layer="layout" svg:width="28.841cm" svg:height="3.557cm" svg:x="18.383cm" svg:y="0.741cm">
          <text:p text:style-name="P1"><text:span text:style-name="T4">BIG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1" draw:text-style-name="P2" draw:layer="layout" svg:width="28.841cm" svg:height="4.573cm" svg:x="0.859cm" svg:y="9.67cm">
          <text:p text:style-name="P1"><text:span text:style-name="T5">BIGGER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3f7b7ca1f24_0_10:notes" draw:style-name="gr2" draw:layer="layout" svg:width="16.932cm" svg:height="9.524cm" svg:x="1.059cm" svg:y="1.905cm" draw:page-number="1" presentation:class="page"/>
          <draw:frame draw:name="Google Shape;52;g3f7b7ca1f24_0_10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utfit" svg:font-family="Outfi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9"/>
    <meta:generator>LibreOfficeDev/6.0.5.2$Linux_X86_64 LibreOffice_project/</meta:generator>
  </office:meta>
</office:document-meta>
</file>